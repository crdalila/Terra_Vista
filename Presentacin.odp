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draw:textarea-horizontal-align="left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margin-top="0.5cm" fo:margin-bottom="0cm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top="0.42cm" fo:margin-bottom="0.35cm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margin-top="0.42cm" fo:margin-bottom="0.35cm"/>
      <style:text-properties fo:font-size="18pt" style:font-size-asian="18pt" style:font-size-complex="18pt"/>
    </style:style>
    <style:style style:name="P14" style:family="paragraph">
      <style:text-properties style:font-name="Arial" fo:font-size="18pt" style:font-size-asian="18pt" style:font-size-complex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<text:span text:style-name="T1">OBJETIVOS</text:span> </text:p>
          </draw:text-box>
        </draw:frame>
        <draw:frame presentation:style-name="pr2" draw:text-style-name="P1" draw:layer="layout" svg:width="25.199cm" svg:height="9.134cm" svg:x="1.5cm" svg:y="3.685cm" presentation:class="subtitle" presentation:user-transformed="true">
          <draw:text-box>
            <text:p>Facilitar las tareas del Product Manag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TAREAS REALIZADA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3 Algoritmos:</text:span></text:p>
              </text:list-item>
            </text:list>
            <text:list text:style-name="L4">
              <text:list-item>
                <text:list>
                  <text:list-header>
                    <text:p text:style-name="P4"><text:span text:style-name="T3">Prioridad (en funció</text:span><text:span text:style-name="T4">n Request)</text:span></text:p>
                    <text:p text:style-name="P4"><text:span text:style-name="T4">Tipo Tarea (en funcion Request)</text:span></text:p>
                    <text:p text:style-name="P4"><text:span text:style-name="T4">Duración de la tarea (en función Request)</text:span></text:p>
                  </text:list-header>
                </text:list>
              </text:list-item>
            </text:list>
            <text:list text:style-name="L3">
              <text:list-item>
                <text:p text:style-name="P3"><text:span text:style-name="T2">API:</text:span></text:p>
                <text:list>
                  <text:list-header>
                    <text:p text:style-name="P4"><text:span text:style-name="T4">Integración de los datos predecidos con FullStack</text:span></text:p>
                    <text:p text:style-name="P4"><text:span text:style-name="T4">Datos nuevos desde FullStack para predec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FUNCIONAMIENTO <text:s/>API</text:span></text:p>
          </draw:text-box>
        </draw:frame>
        <draw:frame presentation:style-name="pr4" draw:text-style-name="P8" draw:layer="layout" svg:width="25.199cm" svg:height="11.5cm" svg:x="1.4cm" svg:y="3cm" presentation:class="outline" presentation:user-transformed="true">
          <draw:text-box>
            <text:list text:style-name="L3">
              <text:list-header>
                <text:p text:style-name="P5"><text:span text:style-name="T5">Integración de Predicciones mediante API con FullStack</text:span></text:p>
              </text:list-header>
              <text:list-item>
                <text:p text:style-name="P6"><text:span text:style-name="T6">Hemos desarrollado una API propia con el objetivo de integrar de manera eficiente nuestros datos predecidos —específicamente: la prioridad, el tipo de tarea y la duración estimada de la tarea.</text:span></text:p>
              </text:list-item>
              <text:list-item>
                <text:p text:style-name="P6"><text:span text:style-name="T6">Esta API cuenta con tres endpoints principales, que permiten una comunicación bidireccional con el sistema FullStack. El flujo automatizado funciona de la siguiente manera:</text:span></text:p>
                <text:list>
                  <text:list-item>
                    <text:p text:style-name="P7"><text:span text:style-name="T6">Predicción y envío de datos: Utilizamos nuestros modelos para predecir los datos mencionados y, posteriormente, enviamos estos resultados a FullStack a través de la API.</text:span></text:p>
                  </text:list-item>
                  <text:list-item>
                    <text:p text:style-name="P7"><text:span text:style-name="T6">Recepción de nuevos datos: Cuando el cliente genera nuevos datos, FullStack nos los devuelve automáticamente. Esto nos permite mantener los modelos actualizados y generar nuevas predicciones.</text:span></text:p>
                  </text:list-item>
                  <text:list-item>
                    <text:p text:style-name="P7"><text:span text:style-name="T6">Reenvío automatizado: Una vez procesadas las nuevas predicciones, las reenviamos nuevamente a FullStack mediante los mismos endpoints, cerrando así el ciclo de integración continua.</text:span></text:p>
                  </text:list-item>
                </text:list>
              </text:list-item>
              <text:list-item>
                <text:p text:style-name="P6"><text:span text:style-name="T6">Este proceso está diseñado para que funcione de forma totalmente automatizada, garantizando una actualización constante y una optimización en tiempo real de las tareas gestionadas por FullStack.</text:span></text:p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FUNCIONAMIENTO API RESUMIDO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3">
              <text:list-header>
                <text:p text:style-name="P9"><text:span text:style-name="T4">Integración Automática de Predicciones con FullStack</text:span></text:p>
                <text:p text:style-name="P10"><text:span text:style-name="T4">Hemos creado una API con 3 endpoints para integrar nuestros datos predecidos: prioridad, tipo de tarea y duración.</text:span></text:p>
                <text:p text:style-name="P10"><text:span text:style-name="T4">El flujo es completamente automático:</text:span></text:p>
                <text:list>
                  <text:list-item>
                    <text:p text:style-name="P11"><text:span text:style-name="T4">Enviamos las predicciones a FullStack.</text:span></text:p>
                  </text:list-item>
                  <text:list-item>
                    <text:p text:style-name="P11"><text:span text:style-name="T4">FullStack nos devuelve nuevos datos generados por el cliente.</text:span></text:p>
                  </text:list-item>
                  <text:list-item>
                    <text:p text:style-name="P11"><text:span text:style-name="T4">Procesamos estos nuevos datos y volvemos a predecir.</text:span></text:p>
                  </text:list-item>
                  <text:list-item>
                    <text:p text:style-name="P11"><text:span text:style-name="T4">Las nuevas predicciones se reenvían automáticamente a FullStack.</text:span></text:p>
                  </text:list-item>
                  <text:list-item>
                    <text:p text:style-name="P11"><text:span text:style-name="T4">Esto permite una actualización continua y una gestión optimizada de tareas en tiempo real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CONCLUSIONES</text:span></text:p>
          </draw:text-box>
        </draw:frame>
        <draw:frame presentation:style-name="pr4" draw:text-style-name="P14" draw:layer="layout" svg:width="25.199cm" svg:height="9.134cm" svg:x="1.801cm" svg:y="5.5cm" presentation:class="outline" presentation:user-transformed="true">
          <draw:text-box>
            <text:list text:style-name="L3">
              <text:list-header>
                <text:p text:style-name="P13"><text:span text:style-name="T8">Con esta solución, automatizamos la asignación de tareas y prioridades, reduciendo significativamente el trabajo manual del Product Manager y mejorando la eficiencia del proceso. Ahora, las decisiones se basan en datos precisos y se actualizan de forma continua. Esto permite que el equipo se enfoque en tareas estratégicas, optimizando recursos y tiempos.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6T10:52:48.934829900</meta:creation-date>
    <meta:generator>LibreOffice/25.2.2.2$Windows_X86_64 LibreOffice_project/7370d4be9e3cf6031a51beef54ff3bda878e3fac</meta:generator>
    <dc:date>2025-06-06T13:59:43.677837100</dc:date>
    <meta:editing-duration>PT29M5S</meta:editing-duration>
    <meta:editing-cycles>6</meta:editing-cycles>
    <meta:document-statistic meta:object-count="41"/>
  </office:meta>
</office:document-meta>
</file>